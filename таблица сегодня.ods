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000000616000001F9184DE9A1.jpg" manifest:media-type="image/jpe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00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0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0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0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1000" calcext:value-type="float">
            <text:p>100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>
            <draw:frame draw:z-index="0" draw:name="Рисунок 6" draw:style-name="gr1" draw:text-style-name="P1" svg:width="18.04cm" svg:height="5.834cm" svg:x="0.822cm" svg:y="0.296cm">
              <draw:image xlink:href="Pictures/1000000000000616000001F9184DE9A1.jpg" xlink:type="simple" xlink:show="embed" xlink:actuate="onLoad" draw:mime-type="image/jpeg">
                <text:p/>
              </draw:image>
            </draw:frame>
          </table:table-cell>
          <table:table-cell table:number-columns-repeated="10"/>
        </table:table-row>
      </table:table>
      <table:table table:name="Лист3" table:style-name="ta2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13:25:54.59935113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3:25:54.803745127</meta:creation-date>
    <dc:title>Таблица</dc:title>
    <meta:generator>LibreOffice/7.6.7.2$Linux_X86_64 LibreOffice_project/60$Build-2</meta:generator>
    <meta:editing-duration>PT50M45S</meta:editing-duration>
    <meta:editing-cycles>2</meta:editing-cycles>
    <dc:date>2026-05-06T14:16:40.073762523</dc:date>
    <meta:document-statistic meta:table-count="3" meta:cell-count="112" meta:object-count="1"/>
    <meta:template xlink:type="simple" xlink:actuate="onRequest" xlink:title="Таблица" xlink:href="../../../../../usr/lib/libreoffice/share/template/common/ШАБЛОН_ЭЛЕКТРОННОЙ_ТАБЛИЦЫ_2019-07-22.ots" meta:date="2026-05-06T13:25:54.665936345"/>
  </office:meta>
</office:document-meta>
</file>